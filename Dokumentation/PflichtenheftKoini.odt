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officeooo:rsid="0004b511" officeooo:paragraph-rsid="0004b511" style:font-size-asian="18pt" style:font-size-complex="18pt"/>
    </style:style>
    <style:style style:name="P2" style:family="paragraph" style:parent-style-name="Standard">
      <style:paragraph-properties fo:text-align="start" style:justify-single-word="false"/>
      <style:text-properties fo:font-size="12pt" officeooo:rsid="0004b511" officeooo:paragraph-rsid="0004b511" style:font-size-asian="10.5pt" style:font-size-complex="12pt"/>
    </style:style>
    <style:style style:name="P3" style:family="paragraph" style:parent-style-name="Standard">
      <style:paragraph-properties fo:text-align="start" style:justify-single-word="false"/>
      <style:text-properties fo:font-size="12pt" fo:font-weight="bold" officeooo:rsid="0004b511" officeooo:paragraph-rsid="0004b511" style:font-size-asian="10.5pt" style:font-weight-asian="bold" style:font-size-complex="12pt" style:font-weight-complex="bold"/>
    </style:style>
    <style:style style:name="P4" style:family="paragraph" style:parent-style-name="Standard">
      <style:paragraph-properties fo:text-align="start" style:justify-single-word="false"/>
      <style:text-properties officeooo:paragraph-rsid="0004b511"/>
    </style:style>
    <style:style style:name="P5" style:family="paragraph" style:parent-style-name="Standard">
      <style:paragraph-properties fo:text-align="start" style:justify-single-word="false"/>
      <style:text-properties fo:font-weight="normal" officeooo:paragraph-rsid="0004b511" style:font-weight-asian="normal" style:font-weight-complex="normal"/>
    </style:style>
    <style:style style:name="P6" style:family="paragraph" style:parent-style-name="Standard">
      <style:paragraph-properties fo:text-align="start" style:justify-single-word="false"/>
      <style:text-properties officeooo:rsid="0004b511" officeooo:paragraph-rsid="0004b511"/>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officeooo:rsid="0004b511" officeooo:paragraph-rsid="0004b511" style:font-size-asian="10.5pt" style:font-size-complex="12pt"/>
    </style:style>
    <style:style style:name="P8" style:family="paragraph" style:parent-style-name="Standard" style:list-style-name="L1">
      <style:paragraph-properties fo:text-align="start" style:justify-single-word="false"/>
      <style:text-properties fo:font-size="12pt" officeooo:rsid="0004b511" officeooo:paragraph-rsid="0004b511" style:font-size-asian="10.5pt" style:font-size-complex="12pt"/>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04b511" officeooo:paragraph-rsid="0004b511"/>
    </style:style>
    <style:style style:name="P10" style:family="paragraph" style:parent-style-name="Standard" style:list-style-name="L2">
      <style:paragraph-properties fo:text-align="start" style:justify-single-word="false"/>
      <style:text-properties fo:font-size="12pt" style:text-underline-style="none" officeooo:rsid="0004b511" officeooo:paragraph-rsid="0004b511" style:font-size-asian="10.5pt" style:font-size-complex="12pt"/>
    </style:style>
    <style:style style:name="P11" style:family="paragraph" style:parent-style-name="Standard">
      <style:paragraph-properties fo:text-align="start" style:justify-single-word="false"/>
      <style:text-properties style:text-underline-style="none" officeooo:rsid="0004b511" officeooo:paragraph-rsid="0004b511"/>
    </style:style>
    <style:style style:name="P12" style:family="paragraph" style:parent-style-name="Standard" style:list-style-name="L3">
      <style:paragraph-properties fo:text-align="start" style:justify-single-word="false"/>
      <style:text-properties fo:font-size="12pt" style:text-underline-style="none" officeooo:rsid="0004b511" officeooo:paragraph-rsid="0004b511" style:font-size-asian="10.5pt" style:font-size-complex="12pt"/>
    </style:style>
    <style:style style:name="P13" style:family="paragraph" style:parent-style-name="Standard" style:list-style-name="L3">
      <style:paragraph-properties fo:text-align="start" style:justify-single-word="false"/>
      <style:text-properties fo:font-size="12pt" style:text-underline-style="none" officeooo:rsid="00064e1a" officeooo:paragraph-rsid="00064e1a" style:font-size-asian="10.5pt" style:font-size-complex="12pt"/>
    </style:style>
    <style:style style:name="P14" style:family="paragraph" style:parent-style-name="Standard">
      <style:paragraph-properties fo:text-align="start" style:justify-single-word="false"/>
      <style:text-properties style:text-underline-style="none" officeooo:rsid="00064e1a" officeooo:paragraph-rsid="00064e1a"/>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officeooo:rsid="00064e1a" officeooo:paragraph-rsid="00064e1a" style:font-size-asian="10.5pt" style:font-size-complex="12pt"/>
    </style:style>
    <style:style style:name="P16" style:family="paragraph" style:parent-style-name="Standard" style:list-style-name="L4">
      <style:paragraph-properties fo:text-align="start" style:justify-single-word="false"/>
      <style:text-properties fo:font-size="12pt" style:text-underline-style="none" officeooo:rsid="00064e1a" officeooo:paragraph-rsid="00064e1a" style:font-size-asian="10.5pt" style:font-size-complex="12pt"/>
    </style:style>
    <style:style style:name="P17" style:family="paragraph" style:parent-style-name="Standard" style:list-style-name="L5">
      <style:paragraph-properties fo:text-align="start" style:justify-single-word="false"/>
      <style:text-properties fo:font-size="12pt" style:text-underline-style="none" officeooo:rsid="00064e1a" officeooo:paragraph-rsid="00064e1a" style:font-size-asian="10.5pt" style:font-size-complex="12pt"/>
    </style:style>
    <style:style style:name="P18" style:family="paragraph" style:parent-style-name="Standard">
      <style:paragraph-properties fo:text-align="start" style:justify-single-word="false"/>
      <style:text-properties fo:font-size="12pt" style:text-underline-style="none" fo:font-weight="bold" officeooo:rsid="00064e1a" officeooo:paragraph-rsid="00064e1a"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officeooo:rsid="00064e1a" officeooo:paragraph-rsid="00064e1a" style:font-size-asian="10.5pt" style:font-size-complex="12pt"/>
    </style:style>
    <style:style style:name="P20" style:family="paragraph" style:parent-style-name="Standard" style:list-style-name="L6">
      <style:paragraph-properties fo:text-align="start" style:justify-single-word="false"/>
      <style:text-properties fo:font-size="12pt" style:text-underline-style="none" officeooo:rsid="00064e1a" officeooo:paragraph-rsid="00064e1a" style:font-size-asian="10.5pt" style:font-size-complex="12pt"/>
    </style:style>
    <style:style style:name="P21" style:family="paragraph" style:parent-style-name="Standard" style:list-style-name="L7">
      <style:paragraph-properties fo:text-align="start" style:justify-single-word="false"/>
      <style:text-properties fo:font-size="12pt" style:text-underline-style="none" officeooo:rsid="00064e1a" officeooo:paragraph-rsid="00064e1a" style:font-size-asian="10.5pt" style:font-size-complex="12pt"/>
    </style:style>
    <style:style style:name="P22" style:family="paragraph" style:parent-style-name="Standard" style:list-style-name="L8">
      <style:paragraph-properties fo:text-align="start" style:justify-single-word="false"/>
      <style:text-properties fo:font-size="12pt" style:text-underline-style="none" officeooo:rsid="00064e1a" officeooo:paragraph-rsid="00064e1a" style:font-size-asian="10.5pt" style:font-size-complex="12pt"/>
    </style:style>
    <style:style style:name="P23" style:family="paragraph" style:parent-style-name="Standard" style:list-style-name="L9">
      <style:paragraph-properties fo:text-align="start" style:justify-single-word="false"/>
      <style:text-properties fo:font-size="12pt" style:text-underline-style="none" officeooo:rsid="00064e1a" officeooo:paragraph-rsid="00064e1a" style:font-size-asian="10.5pt" style:font-size-complex="12pt"/>
    </style:style>
    <style:style style:name="T1" style:family="text">
      <style:text-properties fo:font-size="12pt" officeooo:rsid="0004b511" style:font-size-asian="10.5pt" style:font-size-complex="12pt"/>
    </style:style>
    <style:style style:name="T2" style:family="text">
      <style:text-properties fo:font-size="12pt" officeooo:rsid="00064e1a" style:font-size-asian="10.5pt" style:font-size-complex="12pt"/>
    </style:style>
    <style:style style:name="T3" style:family="text">
      <style:text-properties fo:font-size="12pt" fo:font-weight="normal" officeooo:rsid="00064e1a" style:font-size-asian="10.5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size="12pt" style:font-size-asian="10.5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flichtenheft – One Piece Quiz</text:p>
      <text:p text:style-name="P1"/>
      <text:p text:style-name="P2"/>
      <text:p text:style-name="P2"/>
      <text:p text:style-name="P3">1. Ziel</text:p>
      <text:p text:style-name="P2"/>
      <text:p text:style-name="P4"><text:span text:style-name="T1">Die Anwendung soll eine lokal laufende WPF-Quiz-App <text:s/>sein. Der Benutzer soll Multiple Choice Fragen präsentiert bekommen. Die Navigation durch die App wird durch Schaltflächen geregelt. Das Benutzen der App ist nur möglich wenn man sich vor Beginn Registriert. Die Scores der einzelnen <text:s/>Benutzer werden in einer Datenbank gespeichert und sind abrufbar. </text:span><text:span text:style-name="T2">Als Farbschema werden </text:span><text:span text:style-name="T3">im One Piece Stil die Farben Rot/gelb/schwarz verwendet. </text:span><text:span text:style-name="T4">Die Anwendung folgt dem MVVM-Entwurfsmuster. Das </text:span><text:span text:style-name="T4">Model</text:span><text:span text:style-name="T4"> wird dabei unter Verwendung des </text:span><text:span text:style-name="T4">Entity Frameworks</text:span><text:span text:style-name="T4"> abgebildet </text:span></text:p>
      <text:p text:style-name="P5"><text:span text:style-name="T1"/></text:p>
      <text:p text:style-name="P3">2. Funktionen</text:p>
      <text:p text:style-name="P6"><text:span text:style-name="T5"/></text:p>
      <text:p text:style-name="P6"><text:span text:style-name="T5"/></text:p>
      <text:p text:style-name="P7">Quizverwaltung</text:p>
      <text:p text:style-name="P2"/>
      <text:list text:style-name="L1">
        <text:list-item>
          <text:p text:style-name="P8">Jede Frage enthält</text:p>
          <text:list>
            <text:list-item>
              <text:p text:style-name="P8">Fragetext</text:p>
            </text:list-item>
            <text:list-item>
              <text:p text:style-name="P8">Antwortmöglichkeiten</text:p>
            </text:list-item>
            <text:list-item>
              <text:p text:style-name="P8">Richtige Antwort</text:p>
            </text:list-item>
          </text:list>
        </text:list-item>
      </text:list>
      <text:p text:style-name="P6"><text:span text:style-name="T5"/></text:p>
      <text:p text:style-name="P7">Quizdurchführung</text:p>
      <text:p text:style-name="P9"><text:span text:style-name="T5"/></text:p>
      <text:list text:style-name="L2">
        <text:list-item>
          <text:p text:style-name="P10">jeweils eine Frage wird angezeigt (mit Antwortmöglichkeiten)</text:p>
        </text:list-item>
        <text:list-item>
          <text:p text:style-name="P10"><text:s/>Bei Klick auf eine der Antwortmöglichkeiten wird geprüft ob die Antwort korrekt ist</text:p>
          <text:list>
            <text:list-item>
              <text:p text:style-name="P10">bei falscher Antwort wird der Benutzer informiert, dass die Antwort falsch ist und welche die richtige Antwortmöglichkeit gewesen wäre</text:p>
            </text:list-item>
            <text:list-item>
              <text:p text:style-name="P10">bei richtiger Antwort bekommt der Benutzer die Meldung „Super! Richtig“ und sie wird zu seinem Score addiert</text:p>
            </text:list-item>
          </text:list>
        </text:list-item>
        <text:list-item>
          <text:p text:style-name="P10">Der „Weiter“-Button ist erst enabled wenn die Antwort ausgewertet wurde</text:p>
        </text:list-item>
      </text:list>
      <text:p text:style-name="P11"><text:span text:style-name="T5"/></text:p>
      <text:p text:style-name="P7">Auswertung:</text:p>
      <text:p text:style-name="P11"><text:span text:style-name="T5"/></text:p>
      <text:list text:style-name="L3">
        <text:list-item>
          <text:p text:style-name="P12">Wenn das Quiz beendet wurde wird angezeigt wie viele Fragen der Benutzer richtig beantwortet hat und wie viele Punkte dies ergibt</text:p>
        </text:list-item>
        <text:list-item>
          <text:p text:style-name="P13">Mit dem „Zurück“-Button kommt der Benutzer wieder auf den Startbildschirm</text:p>
        </text:list-item>
      </text:list>
      <text:p text:style-name="P14"><text:span text:style-name="T5"/></text:p>
      <text:p text:style-name="P15">Speichern von Scores:</text:p>
      <text:p text:style-name="P14"><text:span text:style-name="T5"/></text:p>
      <text:list text:style-name="L4">
        <text:list-item>
          <text:p text:style-name="P16">Die Scores werden mit Benutzer-ID in einer Datenbank gespeichert (jeder einzelne Durchlauf)</text:p>
        </text:list-item>
        <text:list-item>
          <text:p text:style-name="P16">Die Gesamtsumme der Punkte soll im Startmenü unter dem Punkt „Bounty“ einsehbar sein</text:p>
        </text:list-item>
        <text:list-item>
          <text:p text:style-name="P16">In diesem Unterpunkt werden auch die besten Scores von anderen Benutzern einsehbar sein</text:p>
        </text:list-item>
      </text:list>
      <text:p text:style-name="P14"><text:span text:style-name="T5"/></text:p>
      <text:p text:style-name="P15">Startbildschirm:</text:p>
      <text:p text:style-name="P14"><text:span text:style-name="T5"/></text:p>
      <text:list text:style-name="L5">
        <text:list-item>
          <text:p text:style-name="P17">Der „Start“-Button führt zur Auswahl des Schwierigkeitsgrads</text:p>
        </text:list-item>
        <text:list-item>
          <text:p text:style-name="P17">Der „Bounty“-Button zeigt die besten Gesamtscores mit Benutzernamen an </text:p>
        </text:list-item>
        <text:list-item>
          <text:p text:style-name="P17"><text:soft-page-break/>Der „Beenden“-Button beendet die Applikation </text:p>
        </text:list-item>
      </text:list>
      <text:p text:style-name="P14"><text:span text:style-name="T5"/></text:p>
      <text:p text:style-name="P18">3. Datenbankstruktur</text:p>
      <text:p text:style-name="P14"><text:span text:style-name="T5"/></text:p>
      <text:p text:style-name="P14"><text:span text:style-name="T5"/></text:p>
      <text:p text:style-name="P19">Datenbank USERS</text:p>
      <text:p text:style-name="P14"><text:span text:style-name="T5"/></text:p>
      <text:list text:style-name="L6">
        <text:list-item>
          <text:p text:style-name="P20">UserID – int primary key</text:p>
        </text:list-item>
        <text:list-item>
          <text:p text:style-name="P20">Benutzername – varchar (30)</text:p>
        </text:list-item>
        <text:list-item>
          <text:p text:style-name="P20">Passwort – varchar (16)</text:p>
        </text:list-item>
      </text:list>
      <text:p text:style-name="P14"><text:span text:style-name="T5"/></text:p>
      <text:p text:style-name="P19">Datenbank FRAGEN</text:p>
      <text:p text:style-name="P14"><text:span text:style-name="T5"/></text:p>
      <text:list text:style-name="L7">
        <text:list-item>
          <text:p text:style-name="P21">FragenID – int primary key</text:p>
        </text:list-item>
        <text:list-item>
          <text:p text:style-name="P21">Fragentext – varchar (100)</text:p>
        </text:list-item>
      </text:list>
      <text:p text:style-name="P14"><text:span text:style-name="T5"/></text:p>
      <text:p text:style-name="P19">Datenbank ANTWORTEN</text:p>
      <text:p text:style-name="P14"><text:span text:style-name="T5"/></text:p>
      <text:list text:style-name="L8">
        <text:list-item>
          <text:p text:style-name="P22">AntwortID – int primary key </text:p>
        </text:list-item>
        <text:list-item>
          <text:p text:style-name="P22">FragenID – int foreign key zu „Fragen“</text:p>
        </text:list-item>
        <text:list-item>
          <text:p text:style-name="P22">Antworttext – varchar </text:p>
        </text:list-item>
        <text:list-item>
          <text:p text:style-name="P22">iscorrect – bool </text:p>
        </text:list-item>
      </text:list>
      <text:p text:style-name="P14"><text:span text:style-name="T5"/></text:p>
      <text:p text:style-name="P19">Datenbank SCORES</text:p>
      <text:p text:style-name="P14"><text:span text:style-name="T5"/></text:p>
      <text:list text:style-name="L9">
        <text:list-item>
          <text:p text:style-name="P23">ResultID – int primary key</text:p>
        </text:list-item>
        <text:list-item>
          <text:p text:style-name="P23">UserID – int foreign key zu „Users“</text:p>
        </text:list-item>
        <text:list-item>
          <text:p text:style-name="P23">RichtigeFragen – int </text:p>
        </text:list-item>
        <text:list-item>
          <text:p text:style-name="P23">Score – int </text:p>
        </text:list-item>
      </text:list>
      <text:p text:style-name="P14"><text:span text:style-name="T5"/></text:p>
      <text:p text:style-name="P6"><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9T17:19:01.166000000</meta:creation-date>
    <dc:date>2026-05-11T01:18:46.856090100</dc:date>
    <meta:editing-duration>PT51M55S</meta:editing-duration>
    <meta:editing-cycles>3</meta:editing-cycles>
    <meta:generator>LibreOffice/25.2.7.2$Windows_X86_64 LibreOffice_project/5cbfd1ab6520636bb5f7b99185aa69bd7456825d</meta:generator>
    <meta:document-statistic meta:table-count="0" meta:image-count="0" meta:object-count="0" meta:page-count="2" meta:paragraph-count="44" meta:word-count="340" meta:character-count="2277" meta:non-whitespace-character-count="1986"/>
  </office:meta>
</office:document-meta>
</file>