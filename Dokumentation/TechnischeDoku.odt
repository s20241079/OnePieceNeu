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e67c6" officeooo:paragraph-rsid="000e67c6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0e67c6" officeooo:paragraph-rsid="000e67c6"/>
    </style:style>
    <style:style style:name="P3" style:family="paragraph" style:parent-style-name="Standard">
      <style:text-properties fo:font-size="20pt" officeooo:rsid="000e67c6" officeooo:paragraph-rsid="000e67c6" style:font-size-asian="20pt" style:font-size-complex="20pt"/>
    </style:style>
    <style:style style:name="P4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5" style:family="paragraph" style:parent-style-name="Standard">
      <style:text-properties fo:color="#000000" loext:opacity="100%" style:font-name="Cascadia Mono" fo:font-size="9.5pt" officeooo:rsid="000e67c6" officeooo:paragraph-rsid="000e67c6" fo:background-color="#ffffff" style:font-size-asian="9.5pt"/>
    </style:style>
    <style:style style:name="P6" style:family="paragraph" style:parent-style-name="Standard">
      <style:text-properties fo:color="#000000" loext:opacity="100%" style:font-name="Liberation Serif" fo:font-size="12pt" officeooo:rsid="000e67c6" officeooo:paragraph-rsid="000e67c6" fo:background-color="#ffffff" style:font-size-asian="12pt" style:font-size-complex="12pt"/>
    </style:style>
    <style:style style:name="P7" style:family="paragraph" style:parent-style-name="Standard">
      <style:paragraph-properties fo:break-before="page"/>
      <style:text-properties fo:color="#000000" loext:opacity="100%" style:font-name="Liberation Serif" fo:font-size="20pt" officeooo:rsid="000e67c6" officeooo:paragraph-rsid="000e67c6" fo:background-color="#ffffff" style:font-size-asian="20pt" style:font-size-complex="20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paragraph-rsid="000e67c6" style:font-size-asian="12pt" style:font-weight-asian="bold" style:font-size-complex="12pt"/>
    </style:style>
    <style:style style:name="P9" style:family="paragraph" style:parent-style-name="Standard" style:list-style-name="L1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style:font-size-asian="12pt" style:font-size-complex="12pt"/>
    </style:style>
    <style:style style:name="P11" style:family="paragraph" style:parent-style-name="Standard" style:list-style-name="L2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fo:font-weight="bold" style:font-size-asian="12pt" style:font-weight-asian="bold" style:font-size-complex="12pt"/>
    </style:style>
    <style:style style:name="P12" style:family="paragraph" style:parent-style-name="Standard" style:list-style-name="L2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13" style:family="paragraph" style:parent-style-name="Standard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officeooo:paragraph-rsid="000e67c6"/>
    </style:style>
    <style:style style:name="P15" style:family="paragraph" style:parent-style-name="Standard" style:list-style-name="L3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16" style:family="paragraph" style:parent-style-name="Standard" style:list-style-name="L3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fo:font-weight="bold" officeooo:rsid="000e67c6" officeooo:paragraph-rsid="000e67c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fo:font-weight="normal" officeooo:rsid="000e67c6" officeooo:paragraph-rsid="000e67c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style:font-size-asian="12pt" style:font-weight-asian="bold" style:font-size-complex="12pt"/>
    </style:style>
    <style:style style:name="P19" style:family="paragraph" style:parent-style-name="Standard" style:list-style-name="L4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20" style:family="paragraph" style:parent-style-name="Standard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21" style:family="paragraph" style:parent-style-name="Standard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officeooo:rsid="000e67c6" officeooo:paragraph-rsid="000e67c6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fo:color="#000000" loext:opacity="100%" style:font-name="Liberation Serif" fo:font-size="20pt" fo:language="de" fo:country="DE" fo:font-weight="normal" officeooo:rsid="000faccf" officeooo:paragraph-rsid="000faccf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style:font-size-asian="12pt" style:font-size-complex="12pt"/>
    </style:style>
    <style:style style:name="P24" style:family="paragraph" style:parent-style-name="Standard" style:list-style-name="L5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20pt" fo:language="de" fo:country="DE" officeooo:rsid="000faccf" officeooo:paragraph-rsid="000faccf" style:font-size-asian="20pt" style:font-size-complex="20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rsid="000faccf" officeooo:paragraph-rsid="0010437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6pt" fo:language="de" fo:country="DE" officeooo:rsid="000faccf" officeooo:paragraph-rsid="0010437f" style:font-size-asian="16pt" style:font-size-complex="16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officeooo:rsid="000faccf" officeooo:paragraph-rsid="0010437f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paragraph-rsid="0010437f" style:font-size-asian="12pt" style:font-weight-asian="bold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officeooo:paragraph-rsid="0010437f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officeooo:rsid="000faccf" officeooo:paragraph-rsid="0010437f" style:font-size-asian="10.5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fo:color="#000000" loext:opacity="100%" style:font-name="Liberation Serif" fo:font-size="16pt" fo:language="de" fo:country="DE" officeooo:rsid="000faccf" officeooo:paragraph-rsid="0010437f" style:font-size-asian="16pt" style:font-size-complex="16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rsid="0010437f" officeooo:paragraph-rsid="0010437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officeooo:rsid="0010437f" officeooo:paragraph-rsid="0010437f" style:font-size-asian="10.5pt" style:font-size-complex="12pt"/>
    </style:style>
    <style:style style:name="P35" style:family="paragraph" style:parent-style-name="Standard" style:list-style-name="L6">
      <style:paragraph-properties fo:margin-top="0.302cm" fo:margin-bottom="0.302cm" style:contextual-spacing="false" fo:text-align="start" style:justify-single-word="false" style:writing-mode="lr-tb"/>
      <style:text-properties fo:color="#000000" loext:opacity="100%" style:font-name="Liberation Serif" fo:font-size="12pt" fo:language="de" fo:country="DE" officeooo:rsid="0010437f" officeooo:paragraph-rsid="0010437f" style:font-size-asian="10.5pt" style:font-size-complex="12p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Liberation Serif" fo:font-size="12pt" fo:language="de" fo:country="DE" officeooo:rsid="0010437f" officeooo:paragraph-rsid="0010437f" style:font-size-asian="10.5pt" style:font-size-complex="12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Liberation Serif" fo:font-size="12pt" fo:language="de" fo:country="DE" fo:font-weight="bold" officeooo:rsid="0010437f" officeooo:paragraph-rsid="0010437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normal" officeooo:rsid="0010437f" officeooo:paragraph-rsid="0010437f" style:font-size-asian="10.5pt" style:font-weight-asian="normal" style:font-size-complex="12pt" style:font-weight-complex="normal"/>
    </style:style>
    <style:style style:name="P39" style:family="paragraph" style:parent-style-name="Standard" style:list-style-name="L7">
      <style:paragraph-properties fo:margin-top="0.302cm" fo:margin-bottom="0.302cm" style:contextual-spacing="false" fo:text-align="start" style:justify-single-word="false" style:writing-mode="lr-tb"/>
      <style:text-properties fo:color="#000000" loext:opacity="100%" style:font-name="Liberation Serif" fo:font-size="12pt" fo:language="de" fo:country="DE" fo:font-weight="normal" officeooo:rsid="0010437f" officeooo:paragraph-rsid="0010437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.302cm" fo:margin-bottom="0.302cm" style:contextual-spacing="false" fo:text-align="start" style:justify-single-word="false" style:writing-mode="lr-tb"/>
      <style:text-properties fo:color="#000000" loext:opacity="100%" style:font-name="Liberation Serif" fo:font-size="12pt" fo:language="de" fo:country="DE" fo:font-weight="bold" officeooo:rsid="0010437f" officeooo:paragraph-rsid="0010437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rsid="000e67c6" officeooo:paragraph-rsid="0010437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normal" officeooo:rsid="0010437f" officeooo:paragraph-rsid="0010437f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color="#fafafa" loext:opacity="100%" fo:font-family="'Segoe UI'" style:font-family-generic="roman" style:font-pitch="variable" fo:font-size="13.5pt" fo:language="de" fo:country="DE" fo:font-weight="bold" style:font-size-asian="13.5pt" style:font-weight-asian="bold"/>
    </style:style>
    <style:style style:name="T3" style:family="text">
      <style:text-properties fo:color="#fafafa" loext:opacity="100%" fo:font-family="'Segoe UI'" style:font-family-generic="roman" style:font-pitch="variable" fo:font-size="9pt" fo:language="de" fo:country="DE" style:font-size-asian="9pt"/>
    </style:style>
    <style:style style:name="T4" style:family="text">
      <style:text-properties fo:language="de" fo:country="DE" fo:font-weight="bold" style:font-weight-asian="bold"/>
    </style:style>
    <style:style style:name="T5" style:family="text">
      <style:text-properties fo:language="de" fo:country="DE"/>
    </style:style>
    <style:style style:name="T6" style:family="text">
      <style:text-properties fo:language="de" fo:country="DE" officeooo:rsid="000e67c6"/>
    </style:style>
    <style:style style:name="T7" style:family="text">
      <style:text-properties fo:color="#000000" loext:opacity="100%" style:font-name="Liberation Serif" fo:font-size="12pt" fo:language="de" fo:country="DE" fo:font-weight="bold" style:font-size-asian="12pt" style:font-weight-asian="bold" style:font-size-complex="12pt"/>
    </style:style>
    <style:style style:name="T8" style:family="text">
      <style:text-properties fo:color="#fafafa" loext:opacity="100%" fo:font-family="'Segoe UI'" style:font-family-generic="roman" style:font-pitch="variable" fo:font-size="9pt" fo:language="de" fo:country="DE" fo:font-weight="normal" style:font-size-asian="9pt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afafa" loext:opacity="100%" fo:font-family="'Segoe UI'" style:font-family-generic="roman" style:font-pitch="variable" fo:font-size="15pt" fo:language="de" fo:country="DE" fo:font-weight="normal" style:font-size-asian="15pt" style:font-weight-asian="normal" style:font-weight-complex="normal"/>
    </style:style>
    <style:style style:name="T11" style:family="text">
      <style:text-properties fo:color="#fafafa" loext:opacity="100%" fo:font-family="'Segoe UI'" style:font-family-generic="roman" style:font-pitch="variable" fo:font-size="15pt" fo:language="de" fo:country="DE" fo:font-weight="bold" style:font-size-asian="15pt" style:font-weight-asian="bold"/>
    </style:style>
    <style:style style:name="T12" style:family="text">
      <style:text-properties fo:language="de" fo:country="DE" officeooo:rsid="000faccf"/>
    </style:style>
    <style:style style:name="T13" style:family="text">
      <style:text-properties fo:color="#fafafa" loext:opacity="100%" fo:font-family="'Segoe UI'" style:font-family-generic="roman" style:font-pitch="variable" fo:font-size="12pt" fo:language="de" fo:country="DE" style:font-size-asian="10.5pt" style:font-size-complex="12pt"/>
    </style:style>
    <style:style style:name="T14" style:family="text">
      <style:text-properties officeooo:rsid="0010437f"/>
    </style:style>
    <style:style style:name="T15" style:family="text">
      <style:text-properties fo:color="#fafafa" loext:opacity="100%" fo:font-family="'Segoe UI'" style:font-family-generic="roman" style:font-pitch="variable" fo:font-size="12pt" fo:language="de" fo:country="D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sche Dokumentation</text:p>
      <text:p text:style-name="P2"/>
      <text:p text:style-name="P2"/>
      <text:p text:style-name="P2"/>
      <text:p text:style-name="P3">1. Überblick</text:p>
      <text:p text:style-name="P3"/>
      <text:p text:style-name="P3"/>
      <text:p text:style-name="P2">OnePieceQuiz ist eine .NET 8 WPF Anwendung die ein Quiz zum Thema „One Piece“ bereitstellt. Die Anwendung verwendet das MVVM-Muster und Entity Framework für die Datenhaltung.</text:p>
      <text:p text:style-name="P2"/>
      <text:p text:style-name="P2"/>
      <text:p text:style-name="P2"/>
      <text:p text:style-name="P2"/>
      <text:p text:style-name="P3">2. Klassendiagramm</text:p>
      <text:p text:style-name="P2"/>
      <text:p text:style-name="Standard" loext:marker-style-name="T1"><text:span text:style-name="T1">classDiagram</text:span></text:p>
      <text:p text:style-name="Standard" loext:marker-style-name="T1"><text:span text:style-name="T1"><text:s text:c="4"/>class Frage {</text:span><text:span text:style-name="T1"/></text:p>
      <text:p text:style-name="Standard" loext:marker-style-name="T1"><text:span text:style-name="T1"><text:s text:c="8"/>+int Id</text:span><text:span text:style-name="T1"/></text:p>
      <text:p text:style-name="Standard" loext:marker-style-name="T1"><text:span text:style-name="T1"><text:s text:c="8"/>+string Text</text:span><text:span text:style-name="T1"/></text:p>
      <text:p text:style-name="Standard" loext:marker-style-name="T1"><text:span text:style-name="T1"><text:s text:c="8"/>+string Antwort</text:span><text:span text:style-name="T1"/></text:p>
      <text:p text:style-name="Standard" loext:marker-style-name="T1"><text:span text:style-name="T1"><text:s text:c="8"/>+string[] Auswahl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<text:s text:c="4"/>class Bounty {</text:span><text:span text:style-name="T1"/></text:p>
      <text:p text:style-name="Standard" loext:marker-style-name="T1"><text:span text:style-name="T1"><text:s text:c="8"/>+int Id</text:span><text:span text:style-name="T1"/></text:p>
      <text:p text:style-name="Standard" loext:marker-style-name="T1"><text:span text:style-name="T1"><text:s text:c="8"/>+string Name</text:span><text:span text:style-name="T1"/></text:p>
      <text:p text:style-name="Standard" loext:marker-style-name="T1"><text:span text:style-name="T1"><text:s text:c="8"/>+int Kopfgeld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<text:s text:c="4"/>class QuizContext {</text:span><text:span text:style-name="T1"/></text:p>
      <text:p text:style-name="Standard" loext:marker-style-name="T1"><text:span text:style-name="T1"><text:s text:c="8"/>+DbSet~Frage~ Fragen</text:span><text:span text:style-name="T1"/></text:p>
      <text:p text:style-name="Standard" loext:marker-style-name="T1"><text:span text:style-name="T1"><text:s text:c="8"/>+DbSet~Bounty~ Bounties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<text:s text:c="4"/>class ViewModelBase</text:span><text:span text:style-name="T1"/></text:p>
      <text:p text:style-name="Standard" loext:marker-style-name="T1"><text:span text:style-name="T1"><text:s text:c="4"/>class NotifyPropertyChanged</text:span><text:span text:style-name="T1"/></text:p>
      <text:p text:style-name="Standard" loext:marker-style-name="T1"><text:span text:style-name="T1"><text:s text:c="4"/>class QuizViewModel</text:span><text:span text:style-name="T1"/></text:p>
      <text:p text:style-name="Standard" loext:marker-style-name="T1"><text:span text:style-name="T1"><text:s text:c="4"/>class ErgebnisViewModel</text:span><text:span text:style-name="T1"/></text:p>
      <text:p text:style-name="Standard" loext:marker-style-name="T1"><text:span text:style-name="T1"><text:s text:c="4"/>class BountyViewModel</text:span><text:span text:style-name="T1"/></text:p>
      <text:p text:style-name="Standard" loext:marker-style-name="T1"><text:span text:style-name="T1"><text:s text:c="4"/>class MainViewModel</text:span><text:span text:style-name="T1"/></text:p>
      <text:p text:style-name="Standard" loext:marker-style-name="T1"><text:span text:style-name="T1"><text:s text:c="4"/>class SchwierigkeitViewModel</text:span><text:span text:style-name="T1"/></text:p>
      <text:p text:style-name="Standard" loext:marker-style-name="T1"><text:span text:style-name="T1"><text:s text:c="4"/>class StartViewModel</text:span><text:span text:style-name="T1"/></text:p>
      <text:p text:style-name="P4" loext:marker-style-name="T1"/>
      <text:p text:style-name="Standard" loext:marker-style-name="T1"><text:span text:style-name="T1"><text:s text:c="4"/>QuizViewModel --|&gt; ViewModelBase</text:span><text:span text:style-name="T1"/></text:p>
      <text:p text:style-name="Standard" loext:marker-style-name="T1"><text:span text:style-name="T1"><text:s text:c="4"/>ErgebnisViewModel --|&gt; ViewModelBase</text:span><text:span text:style-name="T1"/></text:p>
      <text:p text:style-name="Standard" loext:marker-style-name="T1"><text:span text:style-name="T1"><text:s text:c="4"/>BountyViewModel --|&gt; ViewModelBase</text:span><text:span text:style-name="T1"/></text:p>
      <text:p text:style-name="Standard" loext:marker-style-name="T1"><text:span text:style-name="T1"><text:s text:c="4"/>MainViewModel --|&gt; ViewModelBase</text:span><text:span text:style-name="T1"/></text:p>
      <text:p text:style-name="Standard" loext:marker-style-name="T1"><text:span text:style-name="T1"><text:s text:c="4"/>SchwierigkeitViewModel --|&gt; ViewModelBase</text:span><text:span text:style-name="T1"/></text:p>
      <text:p text:style-name="Standard" loext:marker-style-name="T1"><text:span text:style-name="T1"><text:s text:c="4"/>StartViewModel --|&gt; ViewModelBase</text:span><text:span text:style-name="T1"/></text:p>
      <text:p text:style-name="Standard" loext:marker-style-name="T1"><text:span text:style-name="T1"><text:s text:c="4"/>ViewModelBase --|&gt; NotifyPropertyChanged</text:span><text:span text:style-name="T1"/></text:p>
      <text:p text:style-name="Standard" loext:marker-style-name="T1"><text:span text:style-name="T1"><text:s text:c="4"/>QuizContext o-- Frage</text:span><text:span text:style-name="T1"/></text:p>
      <text:p text:style-name="P5"><text:s text:c="4"/>QuizContext o-- Bounty</text:p>
      <text:p text:style-name="P5"/>
      <text:p text:style-name="P6"/>
      <text:p text:style-name="P7">3. Dateien und DB-Tabellen im Detail</text:p>
      <text:p text:style-name="P6"/>
      <text:p text:style-name="P6"/>
      <text:p text:style-name="P8" loext:marker-style-name="T2">Models</text:p>
      <text:p text:style-name="P8" loext:marker-style-name="T2"/>
      <text:p text:style-name="P8" loext:marker-style-name="T2"/>
      <text:list text:style-name="L1">
        <text:list-item>
          <text:list>
            <text:list-item>
              <text:p text:style-name="P9" loext:marker-style-name="T3"><text:span text:style-name="T4">Frage.cs</text:span><text:span text:style-name="T5"><text:line-break/>Enthält die Definition einer Quizfrage mit Eigenschaften wie I</text:span><text:span text:style-name="T6">D</text:span><text:span text:style-name="T5">, Text, Antwort und Auswahlmöglichkeiten.<text:line-break/>Wird als Tabelle „Fragen“ in der Datenbank abgebildet.</text:span></text:p>
            </text:list-item>
            <text:list-item>
              <text:p text:style-name="P9" loext:marker-style-name="T3"><text:span text:style-name="T4">Bounty.cs</text:span><text:span text:style-name="T5"><text:line-break/>Enthält die Definition eines </text:span><text:span text:style-name="T6">Score Eintrags</text:span><text:span text:style-name="T5"> mit I</text:span><text:span text:style-name="T6">D</text:span><text:span text:style-name="T5">, Name und Kopfgeld.<text:line-break/>Wird als Tabelle „Bounties“ in der Datenbank abgebildet.</text:span></text:p>
            </text:list-item>
            <text:list-item>
              <text:p text:style-name="P9" loext:marker-style-name="T3"><text:span text:style-name="T4">QuizContext.cs</text:span><text:span text:style-name="T5"><text:line-break/>Der Entity Framework DbContext, der die Verbindung zur Datenbank herstellt und die DbSets für Fragen und Bounties bereitstellt.</text:span></text:p>
            </text:list-item>
          </text:list>
        </text:list-item>
      </text:list>
      <text:p text:style-name="P6"/>
      <text:p text:style-name="P10" loext:marker-style-name="T2"><text:span text:style-name="T4">ViewModels</text:span></text:p>
      <text:list text:style-name="L2">
        <text:list-header>
          <text:p text:style-name="P11" loext:marker-style-name="T3"/>
        </text:list-header>
        <text:list-item>
          <text:p text:style-name="P12" loext:marker-style-name="T3"><text:span text:style-name="T4">ViewModelBase.cs</text:span><text:span text:style-name="T5"><text:line-break/>Basisklasse für alle ViewModels, erbt von NotifyPropertyChanged.</text:span></text:p>
        </text:list-item>
        <text:list-item>
          <text:p text:style-name="P12" loext:marker-style-name="T3"><text:span text:style-name="T4">QuizViewModel.cs</text:span><text:span text:style-name="T5"><text:line-break/>Steuert die Logik des Quiz, verwaltet aktuelle Frage, Auswertung und Navigation.</text:span></text:p>
        </text:list-item>
        <text:list-item>
          <text:p text:style-name="P12" loext:marker-style-name="T3"><text:span text:style-name="T4">ErgebnisViewModel.cs</text:span><text:span text:style-name="T5"><text:line-break/>Berechnet und zeigt das Ergebnis nach Abschluss des Quiz.</text:span></text:p>
        </text:list-item>
        <text:list-item>
          <text:p text:style-name="P12" loext:marker-style-name="T3"><text:span text:style-name="T4">BountyViewModel.cs</text:span><text:span text:style-name="T5"><text:line-break/>Verwalten und Anzeigen der Kopfgelder.</text:span></text:p>
        </text:list-item>
        <text:list-item>
          <text:p text:style-name="P12" loext:marker-style-name="T3"><text:span text:style-name="T4">MainViewModel.cs</text:span><text:span text:style-name="T5"><text:line-break/>Steuert die Navigation zwischen den Views.</text:span></text:p>
        </text:list-item>
        <text:list-item>
          <text:p text:style-name="P12" loext:marker-style-name="T3"><text:span text:style-name="T4">SchwierigkeitViewModel.cs</text:span><text:span text:style-name="T5"><text:line-break/>Auswahl und Verwaltung der Schwierigkeitsstufe.</text:span></text:p>
        </text:list-item>
        <text:list-item>
          <text:p text:style-name="P12" loext:marker-style-name="T3"><text:span text:style-name="T4">StartViewModel.cs</text:span><text:span text:style-name="T5"><text:line-break/>Logik für den Startbildschirm.</text:span></text:p>
        </text:list-item>
      </text:list>
      <text:p text:style-name="P13" loext:marker-style-name="T3"/>
      <text:p text:style-name="P13" loext:marker-style-name="T3"/>
      <text:p text:style-name="P14" loext:marker-style-name="T2"><text:span text:style-name="T2">3.4</text:span><text:span text:style-name="T7"/></text:p>
      <text:p text:style-name="P8" loext:marker-style-name="T2"/>
      <text:p text:style-name="P8" loext:marker-style-name="T2">Views</text:p>
      <text:p text:style-name="P8" loext:marker-style-name="T2"/>
      <text:p text:style-name="P8" loext:marker-style-name="T2"/>
      <text:list text:style-name="L3">
        <text:list-item>
          <text:p text:style-name="P15" loext:marker-style-name="T3"><text:span text:style-name="T4">QuizView.xaml</text:span><text:span text:style-name="T5"><text:line-break/>UI für das Quiz.</text:span></text:p>
        </text:list-item>
        <text:list-item>
          <text:p text:style-name="P15" loext:marker-style-name="T3"><text:span text:style-name="T4">StartView.xaml</text:span><text:span text:style-name="T5"><text:line-break/>UI <text:s/>für den Startbildschirm.</text:span></text:p>
        </text:list-item>
        <text:list-item>
          <text:p text:style-name="P15" loext:marker-style-name="T3"><text:span text:style-name="T4">SchwierigkeitView.xaml</text:span><text:span text:style-name="T5"><text:line-break/>UI <text:s/>für die Schwierigkeitsauswahl.</text:span></text:p>
        </text:list-item>
        <text:list-item>
          <text:p text:style-name="P15" loext:marker-style-name="T3"><text:span text:style-name="T4">MainWindow.xaml</text:span><text:span text:style-name="T5"><text:line-break/>Hauptfenster der Anwendung.</text:span></text:p>
        </text:list-item>
        <text:list-item>
          <text:p text:style-name="P16" loext:marker-style-name="T8">ErgenisView.xaml<text:line-break/><text:span text:style-name="T9">UI für das Ergegnisfenster und speichern des Scores</text:span></text:p>
        </text:list-item>
        <text:list-item>
          <text:p text:style-name="P16" loext:marker-style-name="T8">BountyView.xaml<text:line-break/><text:span text:style-name="T9">UI für die Ansicht der gespeicherten Scores</text:span></text:p>
        </text:list-item>
      </text:list>
      <text:p text:style-name="P17" loext:marker-style-name="T8"/>
      <text:p text:style-name="P18" loext:marker-style-name="T2">Migrationen</text:p>
      <text:p text:style-name="P18" loext:marker-style-name="T2"/>
      <text:p text:style-name="P18" loext:marker-style-name="T2"/>
      <text:list text:style-name="L4">
        <text:list-item>
          <text:p text:style-name="P19" loext:marker-style-name="T3"><text:span text:style-name="T4">20260608234116_InitialCreate.cs</text:span><text:span text:style-name="T5"><text:line-break/>Erstellt die initiale Datenbankstruktur.</text:span></text:p>
        </text:list-item>
        <text:list-item>
          <text:p text:style-name="P19" loext:marker-style-name="T3"><text:span text:style-name="T4">QuizContextModelSnapshot.cs</text:span><text:span text:style-name="T5"><text:line-break/>Snapshot der aktuellen Datenbankstruktur.</text:span></text:p>
        </text:list-item>
      </text:list>
      <text:p text:style-name="P20" loext:marker-style-name="T3"/>
      <text:p text:style-name="P21" loext:marker-style-name="T3"/>
      <text:p text:style-name="P22" loext:marker-style-name="T10">4. Datenbankstruktur</text:p>
      <text:p text:style-name="P18" loext:marker-style-name="T11"/>
      <text:p text:style-name="P18" loext:marker-style-name="T11"/>
      <text:p text:style-name="P23" loext:marker-style-name="T3">Die Datenbank besteht aus zwei Haupttabellen:</text:p>
      <text:p text:style-name="P23" loext:marker-style-name="T3"/>
      <text:p text:style-name="P23" loext:marker-style-name="T3"/>
      <text:list text:style-name="L5">
        <text:list-item>
          <text:p text:style-name="P24" loext:marker-style-name="T3"><text:span text:style-name="T4">Fragen</text:span><text:span text:style-name="T5"><text:line-break/>Spalten: I</text:span><text:span text:style-name="T12">D</text:span><text:span text:style-name="T5"> (PK), Text, Antwort, Auswahl</text:span></text:p>
        </text:list-item>
        <text:list-item>
          <text:p text:style-name="P24" loext:marker-style-name="T3"><text:span text:style-name="T4">Bounties</text:span><text:span text:style-name="T5"><text:line-break/>Spalten: I</text:span><text:span text:style-name="T12">D</text:span><text:span text:style-name="T5"> (PK), Name, Kopfgeld</text:span></text:p>
        </text:list-item>
      </text:list>
      <text:p text:style-name="P20" loext:marker-style-name="T3"/>
      <text:p text:style-name="P23" loext:marker-style-name="T3">Die Migrationen sorgen für die Erstellung und Aktualisierung der Tabellenstruktur.</text:p>
      <text:p text:style-name="P23" loext:marker-style-name="T3"/>
      <text:p text:style-name="P23" loext:marker-style-name="T3"/>
      <text:p text:style-name="P25" loext:marker-style-name="T3"/>
      <text:p text:style-name="P25" loext:marker-style-name="T3">5. Logik</text:p>
      <text:p text:style-name="P25" loext:marker-style-name="T3"/>
      <text:p text:style-name="P26" loext:marker-style-name="T13">Wichtige Funktionen:</text:p>
      <text:p text:style-name="P26" loext:marker-style-name="T13"/>
      <text:p text:style-name="P26" loext:marker-style-name="T13"/>
      <text:p text:style-name="P26" loext:marker-style-name="T13"/>
      <text:p text:style-name="P27" loext:marker-style-name="T13">FragenAusDatenbankLaden()</text:p>
      <text:p text:style-name="P28" loext:marker-style-name="T13"/>
      <text:p text:style-name="P29" loext:marker-style-name="T3">Funktion:</text:p>
      <text:p text:style-name="P30" loext:marker-style-name="T3"><text:line-break/>Lädt alle Quizfragen aus der Datenbank, filtert sie nach dem gewählten Schwierigkeitsgrad und mischt sie. Initialisiert das Quiz, indem die erste Frage angezeigt wird.</text:p>
      <text:p text:style-name="P18" loext:marker-style-name="T3"/>
      <text:p text:style-name="P18" loext:marker-style-name="T3"/>
      <text:p text:style-name="P29" loext:marker-style-name="T3">Bedeutung:</text:p>
      <text:p text:style-name="P30" loext:marker-style-name="T3"><text:line-break/>Diese Methode <text:span text:style-name="T14">stellt den gesamten </text:span>Fragenpool für das Quiz bereit.</text:p>
      <text:p text:style-name="P31" loext:marker-style-name="T13"/>
      <text:p text:style-name="P31" loext:marker-style-name="T13"/>
      <text:p text:style-name="P31" loext:marker-style-name="T13"/>
      <text:p text:style-name="P31" loext:marker-style-name="T13"/>
      <text:p text:style-name="P32" loext:marker-style-name="T13"/>
      <text:p text:style-name="P27" loext:marker-style-name="T13"/>
      <text:p text:style-name="P27" loext:marker-style-name="T13"/>
      <text:p text:style-name="P27" loext:marker-style-name="T13">AntwortGeklickt()</text:p>
      <text:p text:style-name="P31" loext:marker-style-name="T13"/>
      <text:p text:style-name="P33" loext:marker-style-name="T13">Funktion</text:p>
      <text:p text:style-name="P34" loext:marker-style-name="T13"/>
      <text:p text:style-name="P34" loext:marker-style-name="T13">Diese Funktion wird aufgerufen, wenn der User auf eine Antwort klickt.</text:p>
      <text:p text:style-name="P34" loext:marker-style-name="T13"/>
      <text:list text:style-name="L6">
        <text:list-item>
          <text:list>
            <text:list-item>
              <text:p text:style-name="P35" loext:marker-style-name="T13">Prüft ob die Eingabe gesperrt ist</text:p>
            </text:list-item>
            <text:list-item>
              <text:p text:style-name="P35" loext:marker-style-name="T13">Vergleicht die geklickte Antwort mit der richtigen</text:p>
            </text:list-item>
            <text:list-item>
              <text:p text:style-name="P35" loext:marker-style-name="T13">Färbt die Buttons entsprechend</text:p>
            </text:list-item>
            <text:list-item>
              <text:p text:style-name="P35" loext:marker-style-name="T13">Erhöht den Punktestant</text:p>
            </text:list-item>
            <text:list-item>
              <text:p text:style-name="P35" loext:marker-style-name="T13">Lädt nach einem Delay die nächste Frage</text:p>
            </text:list-item>
          </text:list>
        </text:list-item>
      </text:list>
      <text:p text:style-name="P36" loext:marker-style-name="T13"/>
      <text:p text:style-name="P37" loext:marker-style-name="T13">Bedeutung</text:p>
      <text:p text:style-name="P34" loext:marker-style-name="T13"/>
      <text:p text:style-name="P34" loext:marker-style-name="T13">Die Methode steuert das gesamte Quiz.</text:p>
      <text:p text:style-name="P34" loext:marker-style-name="T13"/>
      <text:p text:style-name="P31" loext:marker-style-name="T13"/>
      <text:p text:style-name="P31" loext:marker-style-name="T13"/>
      <text:p text:style-name="P31" loext:marker-style-name="T13"/>
      <text:p text:style-name="P27" loext:marker-style-name="T13">Speichern() </text:p>
      <text:p text:style-name="P27" loext:marker-style-name="T13"/>
      <text:p text:style-name="P33" loext:marker-style-name="T13">Funktion</text:p>
      <text:p text:style-name="P33" loext:marker-style-name="T13"/>
      <text:p text:style-name="P38" loext:marker-style-name="T15">Diese Funktion speichert nach Quizabschluss die erreichte Punktzahl des Users als High-Score-Eintrag in der Datenbank.</text:p>
      <text:p text:style-name="P38" loext:marker-style-name="T15"/>
      <text:list text:style-name="L7">
        <text:list-item>
          <text:list>
            <text:list-item>
              <text:p text:style-name="P39" loext:marker-style-name="T15">Prüft ob ein Name eingegeben wurde</text:p>
            </text:list-item>
            <text:list-item>
              <text:p text:style-name="P39" loext:marker-style-name="T15">Legt einen neuen Bounty Antrag in der DB an</text:p>
            </text:list-item>
            <text:list-item>
              <text:p text:style-name="P39" loext:marker-style-name="T15">Navigiert zurück zum Startbildschirm</text:p>
            </text:list-item>
          </text:list>
        </text:list-item>
      </text:list>
      <text:p text:style-name="P40" loext:marker-style-name="T15">Bedeutung</text:p>
      <text:p text:style-name="P41" loext:marker-style-name="T13"/>
      <text:p text:style-name="P42" loext:marker-style-name="T15">Diese Funktion sorgt dafür, dass die Ergebnisse dauerhaft gespeichert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17:33:45.742641600</meta:creation-date>
    <dc:date>2026-06-15T14:06:31.994576700</dc:date>
    <meta:editing-duration>PT11M53S</meta:editing-duration>
    <meta:editing-cycles>2</meta:editing-cycles>
    <meta:generator>LibreOffice/25.8.6.2$Windows_X86_64 LibreOffice_project/b4b39682cd9868fa725bc664aff94278d315bd04</meta:generator>
    <meta:document-statistic meta:table-count="0" meta:image-count="0" meta:object-count="0" meta:page-count="5" meta:paragraph-count="92" meta:word-count="480" meta:character-count="3720" meta:non-whitespace-character-count="3198"/>
  </office:meta>
</office:document-meta>
</file>