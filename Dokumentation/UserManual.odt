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6000002300FE02369.png" manifest:media-type="image/png"/>
  <manifest:file-entry manifest:full-path="Pictures/10000001000003700000022CA245EA91.png" manifest:media-type="image/png"/>
  <manifest:file-entry manifest:full-path="Pictures/10000001000003700000022CDFDA9C61.png" manifest:media-type="image/png"/>
  <manifest:file-entry manifest:full-path="Pictures/100000010000036D0000022BA04718E0.png" manifest:media-type="image/png"/>
  <manifest:file-entry manifest:full-path="Pictures/10000001000003640000022CDE683A8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9d8a" officeooo:paragraph-rsid="000e9d8a"/>
    </style:style>
    <style:style style:name="P2" style:family="paragraph" style:parent-style-name="Standard">
      <style:text-properties fo:font-size="18pt" officeooo:rsid="000e9d8a" officeooo:paragraph-rsid="000e9d8a" style:font-size-asian="18pt" style:font-size-complex="18pt"/>
    </style:style>
    <style:style style:name="P3" style:family="paragraph" style:parent-style-name="Standard" style:list-style-name="L1">
      <style:text-properties officeooo:rsid="000e9d8a" officeooo:paragraph-rsid="000e9d8a"/>
    </style:style>
    <style:style style:name="P4" style:family="paragraph" style:parent-style-name="Standard">
      <style:text-properties style:text-underline-style="solid" style:text-underline-width="auto" style:text-underline-color="font-color" officeooo:rsid="000e9d8a" officeooo:paragraph-rsid="000e9d8a"/>
    </style:style>
    <style:style style:name="P5" style:family="paragraph" style:parent-style-name="Standard" style:list-style-name="L2">
      <style:text-properties officeooo:rsid="000e9d8a" officeooo:paragraph-rsid="000e9d8a"/>
    </style:style>
    <style:style style:name="P6" style:family="paragraph" style:parent-style-name="Standard">
      <style:paragraph-properties fo:break-before="page"/>
      <style:text-properties fo:font-size="18pt" officeooo:rsid="000e9d8a" officeooo:paragraph-rsid="000e9d8a" style:font-size-asian="18pt" style:font-size-complex="18pt"/>
    </style:style>
    <style:style style:name="P7" style:family="paragraph" style:parent-style-name="Standard" style:list-style-name="L3">
      <style:text-properties officeooo:rsid="000e9d8a" officeooo:paragraph-rsid="000e9d8a"/>
    </style:style>
    <style:style style:name="P8" style:family="paragraph" style:parent-style-name="Standard" style:list-style-name="L3">
      <style:text-properties officeooo:rsid="000ff26d" officeooo:paragraph-rsid="000ff26d"/>
    </style:style>
    <style:style style:name="P9" style:family="paragraph" style:parent-style-name="Standard">
      <style:text-properties officeooo:rsid="000ff26d" officeooo:paragraph-rsid="000ff26d"/>
    </style:style>
    <style:style style:name="P10" style:family="paragraph" style:parent-style-name="Standard">
      <style:paragraph-properties fo:break-before="page"/>
      <style:text-properties fo:font-size="18pt" officeooo:rsid="000ff26d" officeooo:paragraph-rsid="000ff26d" style:font-size-asian="18pt" style:font-size-complex="18pt"/>
    </style:style>
    <style:style style:name="P11" style:family="paragraph" style:parent-style-name="Standard">
      <style:text-properties style:text-underline-style="solid" style:text-underline-width="auto" style:text-underline-color="font-color" officeooo:rsid="000ff26d" officeooo:paragraph-rsid="000ff26d"/>
    </style:style>
    <style:style style:name="P12" style:family="paragraph" style:parent-style-name="Standard" style:list-style-name="L4">
      <style:text-properties officeooo:rsid="000ff26d" officeooo:paragraph-rsid="000ff26d"/>
    </style:style>
    <style:style style:name="P13" style:family="paragraph" style:parent-style-name="Standard" style:list-style-name="L4">
      <style:text-properties officeooo:paragraph-rsid="000ff26d"/>
    </style:style>
    <style:style style:name="P14" style:family="paragraph" style:parent-style-name="Standard">
      <style:text-properties officeooo:paragraph-rsid="000ff26d"/>
    </style:style>
    <style:style style:name="P15" style:family="paragraph" style:parent-style-name="Standard">
      <style:text-properties fo:font-size="18pt" officeooo:rsid="000ff26d" officeooo:paragraph-rsid="000ff26d" style:font-size-asian="18pt" style:font-size-complex="18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officeooo:rsid="000ff26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enutzerhandbuc</text:span><text:span text:style-name="T2">h</text:span></text:p>
      <text:p text:style-name="P1"/>
      <text:p text:style-name="P2">Systemanforderungen</text:p>
      <text:p text:style-name="P1"/>
      <text:p text:style-name="P1">Um das Spiel ausführen zu können müssen folgende Mindestvoraussetzungen erfüllt sein:</text:p>
      <text:p text:style-name="P1"/>
      <text:list text:style-name="L1">
        <text:list-item>
          <text:p text:style-name="P3">Betriebssystem: Microsoft Windows 10 oder Windows 11</text:p>
        </text:list-item>
        <text:list-item>
          <text:p text:style-name="P3">Laufzeitumgebung: .NET 8.0 Desktop Runtime</text:p>
        </text:list-item>
        <text:list-item>
          <text:p text:style-name="P3">Grafikauflösung: Mindestens 1280x720 Pixel für optimale Darstellung der Bilder</text:p>
        </text:list-item>
      </text:list>
      <text:p text:style-name="P1"/>
      <text:p text:style-name="P2">Spielstart und Hauptmenü</text:p>
      <text:p text:style-name="P1"/>
      <text:p text:style-name="P1">Beim Starten der App wird das Hauptmenü geöffnet.</text:p>
      <text:p text:style-name="P1"/>
      <text:p text:style-name="P1"><draw:frame draw:style-name="fr1" draw:name="Bild1" text:anchor-type="char" svg:width="17cm" svg:height="10.744cm" draw:z-index="0"><draw:image xlink:href="Pictures/1000000100000376000002300FE02369.png" xlink:type="simple" xlink:show="embed" xlink:actuate="onLoad" draw:mime-type="image/png"/></draw:frame></text:p>
      <text:p text:style-name="P1"/>
      <text:p text:style-name="P1"/>
      <text:p text:style-name="P4">Buttons:</text:p>
      <text:p text:style-name="P1"/>
      <text:list text:style-name="L2">
        <text:list-item>
          <text:p text:style-name="P5">Start-Button: Bei Klick auf diesen Button werden Sie zur Schwierigkeitsgradauswahl weitergeleitet</text:p>
        </text:list-item>
        <text:list-item>
          <text:p text:style-name="P5">Bounty-Button: Bei Klick auf diesen Button werden Sie auf die Bounty-View weitergeleitet, dort können Sie die HighScores anderer User einsehen</text:p>
        </text:list-item>
        <text:list-item>
          <text:p text:style-name="P5">Beenden-Button: Bei Klick auf diesen Button wird die Anwendung geschlossen</text:p>
        </text:list-item>
      </text:list>
      <text:p text:style-name="P1"/>
      <text:p text:style-name="P1"/>
      <text:p text:style-name="P1"/>
      <text:p text:style-name="P6">Die Schwierigkeitsauswahl</text:p>
      <text:p text:style-name="P1"/>
      <text:p text:style-name="P1">Wenn Sie im Hauptmenü auf den Start-Button klicken, werden Sie auf diese Seite weitergeleitet</text:p>
      <text:p text:style-name="P1"><draw:frame draw:style-name="fr2" draw:name="Bild2" text:anchor-type="char" svg:x="0.159cm" svg:y="0.392cm" svg:width="17cm" svg:height="10.74cm" draw:z-index="1"><draw:image xlink:href="Pictures/10000001000003700000022CA245EA91.png" xlink:type="simple" xlink:show="embed" xlink:actuate="onLoad" draw:mime-type="image/png"/></draw:frame></text:p>
      <text:p text:style-name="P1"/>
      <text:p text:style-name="P4">Buttons:</text:p>
      <text:p text:style-name="P1"/>
      <text:list text:style-name="L3">
        <text:list-item>
          <text:p text:style-name="P7"><text:span text:style-name="T3">Radio-Buttons: Hier </text:span>können Sie den Schwierigkeitsgrad der Fragen auswählen </text:p>
        </text:list-item>
        <text:list-item>
          <text:p text:style-name="P8">Zurück-Button: Bei Klick auf diesen Button kommen Sie zurücl ins Hauptmenü</text:p>
        </text:list-item>
        <text:list-item>
          <text:p text:style-name="P8">Weiter-Button: Bei Klick auf diesen Button startet das Quiz mit der ausgewählten Schwierigkeitsauswahl</text:p>
        </text:list-item>
      </text:list>
      <text:p text:style-name="P9"/>
      <text:p text:style-name="P9"/>
      <text:p text:style-name="P10">Das Quiz</text:p>
      <text:p text:style-name="P9"/>
      <text:p text:style-name="P9">Sobald Sie einen Schwierigkeitsgrad ausgewählt haben, startet das Quiz. Es werden 10 Fragen vom ausgewählten Schwierigkeitsgrad zufällig ausgewählt und Sie müssen Sie nacheinander beantworten.</text:p>
      <text:p text:style-name="P9"/>
      <text:p text:style-name="P9"><draw:frame draw:style-name="fr1" draw:name="Bild3" text:anchor-type="char" svg:width="17cm" svg:height="10.74cm" draw:z-index="2"><draw:image xlink:href="Pictures/10000001000003700000022CDFDA9C61.png" xlink:type="simple" xlink:show="embed" xlink:actuate="onLoad" draw:mime-type="image/png"/></draw:frame></text:p>
      <text:p text:style-name="P1"/>
      <text:p text:style-name="P1"/>
      <text:p text:style-name="P9">Oben sehen Sie die Frage und darunter 4 Antwortmöglichkeiten, von denen einen richtig ist. Durch Klick auf eine Antwort wird ausgewertet ob die Antwort richtig ist.</text:p>
      <text:p text:style-name="P9"/>
      <text:p text:style-name="P11">Möglichkeiten:</text:p>
      <text:list text:style-name="L4">
        <text:list-item>
          <text:p text:style-name="P12">Die Frage ist richtig: die Antwort leutet grün auf und Sie werden nach wenigen Sekunden zur nächsten Frage weitergeleitet</text:p>
        </text:list-item>
        <text:list-item>
          <text:p text:style-name="P13"><text:span text:style-name="T3">Die Frage ist falsch: Die Antwort leutet rot auf und die richtige Antwort leutet grün auf, danach werden Sie auch nach wenigen Sekunden zur nächsten Frage weitergeleitet</text:span></text:p>
        </text:list-item>
      </text:list>
      <text:p text:style-name="P14"/>
      <text:p text:style-name="P9">Der Beenden-Button beendet das Quiz vorzeitig und Sie werden ins Hauptmenü zurückgeleitet.</text:p>
      <text:p text:style-name="P9"/>
      <text:p text:style-name="P9"/>
      <text:p text:style-name="P10">Die Auswertung</text:p>
      <text:p text:style-name="P15"/>
      <text:p text:style-name="P9">Wenn Sie die letzte Frage beantwortet haben werden Sie automatisch auf die ErgebnisView weitergeleitet. </text:p>
      <text:p text:style-name="P9"/>
      <text:p text:style-name="P9"><draw:frame draw:style-name="fr3" draw:name="Bild4" text:anchor-type="char" svg:width="17cm" svg:height="10.888cm" draw:z-index="3"><draw:image xlink:href="Pictures/10000001000003640000022CDE683A86.png" xlink:type="simple" xlink:show="embed" xlink:actuate="onLoad" draw:mime-type="image/png"/></draw:frame></text:p>
      <text:p text:style-name="P14"/>
      <text:p text:style-name="P9">Hier erfahren Sie wie viele Fragen Sie richtig beantwortet haben. Als Abschluss können Sie einen Namen eintippen und unter diesem Namen wird Ihr Score dann in der Bounty-Rangliste gespeichert.</text:p>
      <text:p text:style-name="P9"/>
      <text:p text:style-name="P9">Durch klick auf Den „Punkte Speichern“ Button wird Ihr Score gespeichert und Sie werden in das Hauptmenü zurückgeleitet.</text:p>
      <text:p text:style-name="P9"/>
      <text:p text:style-name="P9"/>
      <text:p text:style-name="P9"/>
      <text:p text:style-name="P9"/>
      <text:p text:style-name="P1"/>
      <text:p text:style-name="P1"/>
      <text:p text:style-name="P10">Die Rangliste</text:p>
      <text:p text:style-name="P9"/>
      <text:p text:style-name="P9">Vor oder Nachdem Sie einen Quizdurchlauf starten können Sie vom Hauptmenü aus durch einen Klick auf den Bounty-Button die Bestenliste einsehen.</text:p>
      <text:p text:style-name="P9"/>
      <text:p text:style-name="P9"><draw:frame draw:style-name="fr3" draw:name="Bild5" text:anchor-type="char" svg:width="17cm" svg:height="10.758cm" draw:z-index="4"><draw:image xlink:href="Pictures/100000010000036D0000022BA04718E0.png" xlink:type="simple" xlink:show="embed" xlink:actuate="onLoad" draw:mime-type="image/png"/></draw:frame></text:p>
      <text:p text:style-name="P1"/>
      <text:p text:style-name="P9">Hier sieht man links in der Tabelle den Namen und rechts in der selben Zeile den dazugehörigen Score. </text:p>
      <text:p text:style-name="P9"/>
      <text:p text:style-name="P9">Durch Klick auf den „Zurück zum Hauptmenü“-Button gelangt man wieder auf den Ausgangsbildschirm der App.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3T16:13:24.453792700</meta:creation-date>
    <dc:date>2026-06-13T16:38:21.339714700</dc:date>
    <meta:editing-duration>PT1M1S</meta:editing-duration>
    <meta:editing-cycles>1</meta:editing-cycles>
    <meta:document-statistic meta:table-count="0" meta:image-count="5" meta:object-count="0" meta:page-count="5" meta:paragraph-count="33" meta:word-count="378" meta:character-count="2624" meta:non-whitespace-character-count="2287"/>
    <meta:generator>LibreOffice/25.2.7.2$Windows_X86_64 LibreOffice_project/5cbfd1ab6520636bb5f7b99185aa69bd7456825d</meta:generator>
  </office:meta>
</office:document-meta>
</file>